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ear Hiring Manager,</text:p>
      <text:p text:style-name="Text_20_body">I am excited to apply for opportunities in Machine Learning, AI Engineering, and Computer Vision at your organization.</text:p>
      <text:p text:style-name="Text_20_body">I am a self driven Machine Learning Engineer with hands on experience building AI systems using Deep Learning, Computer Vision, Semantic Search, and Generative AI. Through independent learning and project based development, I have built practical experience in designing, training, and deploying end to end machine learning solutions.</text:p>
      <text:p text:style-name="Text_20_body">One of my key projects, SmartCart AI, is a production ready multi modal semantic search system that uses CLIP embeddings and FAISS for scalable text and image based product retrieval across nearly 60K products. I developed REST APIs using FastAPI and worked with Docker based deployment workflows to support scalable integration.</text:p>
      <text:p text:style-name="Text_20_body">In addition, I have developed real time computer vision applications using OpenCV, implemented GANs from scratch using PyTorch, and explored diffusion model architectures and optimization strategies. My technical experience includes PyTorch, TensorFlow, Hugging Face, OpenCV, FastAPI, Docker, AWS, PostgreSQL, and related AI/ML tooling.</text:p>
      <text:p text:style-name="Text_20_body">I am also a Kaggle Expert with multiple medals, which reflects my problem solving ability, consistency, and experience working with real world datasets and competitive machine learning environments.</text:p>
      <text:p text:style-name="Text_20_body">I am eager to contribute my skills, continue learning from experienced professionals, and grow as an AI Engineer in a challenging and collaborative environment. Thank you for considering my application. I would welcome the opportunity to discuss how I can contribute to your team.</text:p>
      <text:p text:style-name="Text_20_body">Sincerely,<text:line-break/>Aromal Dileep</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9T15:32:31.320333527</meta:creation-date>
    <dc:date>2026-05-19T15:37:57.995137890</dc:date>
    <meta:editing-duration>PT3M11S</meta:editing-duration>
    <meta:editing-cycles>3</meta:editing-cycles>
    <meta:generator>LibreOffice/25.8.6.2$Linux_X86_64 LibreOffice_project/580$Build-2</meta:generator>
    <meta:document-statistic meta:table-count="0" meta:image-count="0" meta:object-count="0" meta:page-count="1" meta:paragraph-count="8" meta:word-count="238" meta:character-count="1639" meta:non-whitespace-character-count="1409"/>
  </office:meta>
</office:document-meta>
</file>